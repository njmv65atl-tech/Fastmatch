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1390in" fo:text-align="center" fo:line-height="115%"/>
      <style:text-properties style:font-name="Times" fo:font-size="26.0pt"/>
    </style:style>
    <style:style style:name="P2" style:family="paragraph" style:parent-style-name="Standard">
      <style:paragraph-properties fo:margin-bottom="0.1390in" fo:text-align="center" fo:line-height="115%"/>
      <style:text-properties style:font-name="Times" fo:font-size="16.0pt"/>
    </style:style>
    <style:style style:name="P3" style:family="paragraph" style:parent-style-name="Standard">
      <style:paragraph-properties fo:margin-bottom="0.1390in" fo:line-height="115%"/>
      <style:text-properties style:font-name="Times" fo:font-size="11.0pt"/>
    </style:style>
    <style:style style:name="P4" style:family="paragraph" style:parent-style-name="Standard">
      <style:text-properties style:font-name="Times" fo:font-size="11.0pt"/>
    </style:style>
    <style:style style:name="P5" style:family="paragraph" style:parent-style-name="Standard">
      <style:paragraph-properties fo:margin-top="0.3335in" fo:line-height="115%"/>
      <style:text-properties style:font-name="Times" fo:font-size="14.0pt" fo:color="#003366"/>
    </style:style>
    <style:style style:name="P6" style:family="paragraph" style:parent-style-name="Standard">
      <style:paragraph-properties fo:margin-bottom="0.1390in" fo:line-height="115%"/>
      <style:text-properties style:font-name="Times" fo:font-size="14.0pt" fo:color="#003366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style:font-name="Times New Roma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FASTMATCH APPLICATION OVERVIEW</text:span></text:p>
      <text:p text:style-name="P2"><text:span text:style-name="T2">Detailed Product Architecture &amp; Functional Documentation</text:span></text:p>
      <text:p text:style-name="P3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4">Document Information</text:p>
          </table:table-cell>
          <table:table-cell table:style-name="TableCell1">
            <text:p text:style-name="P4">Details</text:p>
          </table:table-cell>
        </table:table-row>
        <table:table-row>
          <table:table-cell table:style-name="TableCell1">
            <text:p text:style-name="P4">Application Name</text:p>
          </table:table-cell>
          <table:table-cell table:style-name="TableCell1">
            <text:p text:style-name="P4">FastMatch</text:p>
          </table:table-cell>
        </table:table-row>
        <table:table-row>
          <table:table-cell table:style-name="TableCell1">
            <text:p text:style-name="P4">Application Category</text:p>
          </table:table-cell>
          <table:table-cell table:style-name="TableCell1">
            <text:p text:style-name="P4">Real-Time Social Matching Platform</text:p>
          </table:table-cell>
        </table:table-row>
        <table:table-row>
          <table:table-cell table:style-name="TableCell1">
            <text:p text:style-name="P4">Supported Platforms</text:p>
          </table:table-cell>
          <table:table-cell table:style-name="TableCell1">
            <text:p text:style-name="P4">iOS, Android </text:p>
          </table:table-cell>
        </table:table-row>
        <table:table-row>
          <table:table-cell table:style-name="TableCell1">
            <text:p text:style-name="P4">Frontend Stack</text:p>
          </table:table-cell>
          <table:table-cell table:style-name="TableCell1">
            <text:p text:style-name="P4">React Native, TypeScript</text:p>
          </table:table-cell>
        </table:table-row>
        <table:table-row>
          <table:table-cell table:style-name="TableCell1">
            <text:p text:style-name="P4">Real-Time Layer</text:p>
          </table:table-cell>
          <table:table-cell table:style-name="TableCell1">
            <text:p text:style-name="P4">Socket.IO</text:p>
          </table:table-cell>
        </table:table-row>
        <table:table-row>
          <table:table-cell table:style-name="TableCell1">
            <text:p text:style-name="P4">Streaming Technology</text:p>
          </table:table-cell>
          <table:table-cell table:style-name="TableCell1">
            <text:p text:style-name="P4">WebRTC &amp; Stream Video SDK</text:p>
          </table:table-cell>
        </table:table-row>
        <table:table-row>
          <table:table-cell table:style-name="TableCell1">
            <text:p text:style-name="P4">Notification Services</text:p>
          </table:table-cell>
          <table:table-cell table:style-name="TableCell1">
            <text:p text:style-name="P4">Firebase &amp; Notifee</text:p>
          </table:table-cell>
        </table:table-row>
        <table:table-row>
          <table:table-cell table:style-name="TableCell1">
            <text:p text:style-name="P4">Version</text:p>
          </table:table-cell>
          <table:table-cell table:style-name="TableCell1">
            <text:p text:style-name="P4"><text:s/>1.0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</table:table>
      <text:p text:style-name="P3"/>
      <text:p text:style-name="P5"><text:span text:style-name="T1">1. Executive Summary</text:span></text:p>
      <text:p text:style-name="P3">FastMatch is a modern real-time social networking and matching application developed to connect users globally through secure video calls, private messaging, and intelligent matchmaking systems. <text:line-break/>The application focuses on creating a premium social discovery experience where users can instantly connect with compatible people through live radar-based matching.<text:line-break/><text:line-break/>The platform is designed with scalability, performance, and user engagement in mind. It combines real-time communication technologies, secure authentication systems, and premium subscription monetization into a unified ecosystem.<text:line-break/><text:line-break/>FastMatch provides users with:<text:line-break/>• Real-time matchmaking<text:line-break/>• Secure HD video calling<text:line-break/>• Private messaging<text:line-break/>• Premium matching filters<text:line-break/>• Push notifications<text:line-break/>• User safety &amp; reporting systems<text:line-break/>• Cross-platform accessibility</text:p>
      <text:p text:style-name="P5"><text:span text:style-name="T1">2. High-Level Technology Stack</text:span></text:p>
      <text:p text:style-name="P3">The FastMatch application is built using industry-standard technologies optimized for performance, scalability, and maintainability.<text:line-break/><text:line-break/>Frontend Layer:<text:line-break/>The application uses React Native with TypeScript to support cross-platform development across iOS and Android devices from a single codebase. This significantly reduces development and maintenance costs while maintaining a native user experience.<text:line-break/><text:line-break/>Real-Time Communication:<text:line-break/>Socket.IO is used to power instant synchronization between users, enabling matchmaking queues, online status indicators, typing indicators, and instant messaging delivery.<text:line-break/><text:line-break/>Video Streaming:<text:line-break/>WebRTC and Stream Video SDK are integrated to deliver secure, low-latency HD video and audio calls.<text:line-break/><text:line-break/>State Management:<text:line-break/>Redux and AsyncStorage manage global application states, authentication sessions, and persistent user preferences.<text:line-break/><text:line-break/>Notifications:<text:line-break/>Firebase Cloud Messaging and Notifee power push notifications and background alerts for calls, chats, and new matches.</text:p>
      <text:p text:style-name="P5"><text:span text:style-name="T1">3. Application Architecture</text:span></text:p>
      <text:p text:style-name="P3">FastMatch follows a modular and scalable architecture designed for long-term maintainability.<text:line-break/><text:line-break/>The application architecture is divided into:<text:line-break/>• Presentation Layer<text:line-break/>• Business Logic Layer<text:line-break/>• Real-Time Communication Layer<text:line-break/>• Media Streaming Layer<text:line-break/>• State Management Layer<text:line-break/>• Notification Layer<text:line-break/><text:line-break/>This layered structure ensures clean separation of responsibilities, faster development cycles, and easier scalability.<text:line-break/><text:line-break/>The architecture supports:<text:line-break/>• High concurrent users<text:line-break/>• Real-time communication<text:line-break/>• Cross-platform rendering<text:line-break/>• Modular feature deployment<text:line-break/>• Cloud-based scaling</text:p>
      <text:p text:style-name="P5"><text:span text:style-name="T1">4. User Onboarding &amp; Authentication Flow</text:span></text:p>
      <text:p text:style-name="P3">The onboarding workflow ensures that only verified and authenticated users gain access to the platform.<text:line-break/><text:line-break/>Registration Workflow:<text:line-break/>1. User creates an account using email or phone number.<text:line-break/>2. The system generates an OTP verification code.<text:line-break/>3. The OTP is sent via email or SMS.<text:line-break/>4. User verifies the code.<text:line-break/>5. Profile setup is initiated.<text:line-break/><text:line-break/>Profile Setup:<text:line-break/>Users complete their profile by:<text:line-break/>• Uploading profile images<text:line-break/>• Setting display names<text:line-break/>• Adding interests<text:line-break/>• Selecting preferences<text:line-break/>• Adding bio information<text:line-break/><text:line-break/>Session Validation:<text:line-break/>The application automatically validates active login sessions when launched and redirects users appropriately.</text:p>
      <text:p text:style-name="P5"><text:span text:style-name="T1">5. Radar Matchmaking System</text:span></text:p>
      <text:p text:style-name="P3">The Radar Matching feature is the core engagement system of FastMatch.<text:line-break/><text:line-break/>When users tap the “Start Matching” button, they enter a live matchmaking queue represented through an animated radar interface.<text:line-break/><text:line-break/>Matchmaking Features:<text:line-break/>• Real-time queue synchronization<text:line-break/>• Compatibility-based matching<text:line-break/>• Preference filtering<text:line-break/>• Dynamic search animations<text:line-break/>• Instant match discovery<text:line-break/><text:line-break/>Matching Parameters:<text:line-break/>• Gender preferences<text:line-break/>• Shared interests<text:line-break/>• Online availability<text:line-break/><text:line-break/>Once a compatible match is found:<text:line-break/>• User profile information is displayed<text:line-break/>• A countdown timer begins<text:line-break/>• Both users must accept the match<text:line-break/>• If declined, the queue resumes automatically</text:p>
      <text:p text:style-name="P5"><text:span text:style-name="T1">6. Real-Time Video Calling Experience</text:span></text:p>
      <text:p text:style-name="P3">FastMatch integrates secure HD video communication using WebRTC and Stream Video SDK.<text:line-break/><text:line-break/>Call Features:<text:line-break/>• HD video calls<text:line-break/>• Audio calling<text:line-break/>• Camera switching<text:line-break/>• Mute/unmute controls<text:line-break/>• Call termination controls<text:line-break/>• Dynamic network optimization<text:line-break/><text:line-break/>The video engine automatically adapts call quality based on internet bandwidth to maintain call stability on both Wi-Fi and mobile networks.<text:line-break/><text:line-break/>Safety Features:<text:line-break/>• Immediate call termination on report<text:line-break/>• Moderation flagging<text:line-break/><text:line-break/><text:line-break/>Post-call feedback allows users to rate their interaction experience to improve future match quality.</text:p>
      <text:p text:style-name="P5"><text:span text:style-name="T1">7. Private Messaging System</text:span></text:p>
      <text:p text:style-name="P3">The messaging module allows users to maintain real-time private conversations.<text:line-break/><text:line-break/>Messaging Features:<text:line-break/>• Instant text messaging<text:line-break/>• Read receipts<text:line-break/>• Unread message counters<text:line-break/>• Edit sent messages<text:line-break/>• Delete message history<text:line-break/><text:line-break/>Inbox Management:<text:line-break/>Users can view:<text:line-break/>• Active conversations<text:line-break/>• Recent messages<text:line-break/>• Notification badges<text:line-break/>• Chat timestamps<text:line-break/><text:line-break/>Privacy Controls:<text:line-break/>Users can:<text:line-break/>• Block contacts<text:line-break/>• Unblock users<text:line-break/>• Restrict communication<text:line-break/></text:p>
      <text:p text:style-name="P6"><text:span text:style-name="T1">8. Push Notification System</text:span></text:p>
      <text:p text:style-name="P3">FastMatch uses Firebase and Notifee for notification management.<text:line-break/><text:line-break/>Notification Types:<text:line-break/>• New chat messages<text:line-break/><text:line-break/>Background Processing:<text:line-break/>Notifications continue functioning even when:<text:line-break/>• The app is minimized<text:line-break/><text:line-break/>This improves engagement and user retention significantly.</text:p>
      <text:p text:style-name="P5"><text:span text:style-name="T1">9. Privacy, Security &amp; User Safety</text:span></text:p>
      <text:p text:style-name="P3">User safety and secure communication are central priorities within FastMatch.<text:line-break/><text:line-break/>Security Features:<text:line-break/>• Encrypted communication<text:line-break/>• Secure session management<text:line-break/>• Protected authentication<text:line-break/>• Secure API communication<text:line-break/>• Moderation systems<text:line-break/><text:line-break/>Safety Tools:<text:line-break/>• User reporting<text:line-break/>• Contact blocking<text:line-break/>• Moderation workflows<text:line-break/>• Abuse detection systems<text:line-break/><text:line-break/>Community Protection:<text:line-break/>Reported users are automatically flagged for administrative review.</text:p>
      <text:p text:style-name="P5"><text:span text:style-name="T1">10. Scalability &amp; Performance Optimization</text:span></text:p>
      <text:p text:style-name="P3">FastMatch is engineered for scalability and responsive real-time performance.<text:line-break/><text:line-break/>Performance Features:<text:line-break/>• Optimized rendering<text:line-break/>• Lightweight API communication<text:line-break/>• Efficient memory management<text:line-break/>• Background task optimization<text:line-break/><text:line-break/>Scalability Features:<text:line-break/>• Cloud-ready architecture<text:line-break/>• Distributed communication support<text:line-break/>• Modular deployments<text:line-break/>• High concurrency optimization<text:line-break/><text:line-break/>These optimizations ensure consistent user experience even under heavy traffic.</text:p>
      <text:p text:style-name="P5"><text:span text:style-name="T1">11. Core User Workflow Sequences</text:span></text:p>
      <text:p text:style-name="P3">Onboarding Flow:<text:line-break/>Welcome Screen <text:span text:style-name="T3">→</text:span><text:s/>Registration <text:span text:style-name="T3">→</text:span><text:s/>OTP Verification <text:span text:style-name="T3">→</text:span><text:s/>Profile Setup <text:span text:style-name="T3">→</text:span><text:s/>Dashboard<text:line-break/><text:line-break/>Matching Flow:<text:line-break/>Dashboard <text:span text:style-name="T3">→</text:span><text:s/>Match Preferences <text:span text:style-name="T3">→</text:span><text:s/>Radar Search <text:span text:style-name="T3">→</text:span><text:s/>Match Found <text:span text:style-name="T3">→</text:span><text:s/>Acceptance <text:span text:style-name="T3">→</text:span><text:s/>Video Call <text:span text:style-name="T3">→</text:span><text:s/>Feedback<text:line-break/><text:line-break/>Messaging Flow:<text:line-break/>Dashboard <text:span text:style-name="T3">→</text:span><text:s/>Chat Inbox <text:span text:style-name="T3">→</text:span><text:s/>Conversation Thread <text:span text:style-name="T3">→</text:span><text:s/>Real-Time Messaging<text:line-break/><text:line-break/>Notification Flow:<text:line-break/>Server Events <text:span text:style-name="T3">→</text:span><text:s/>Push Notifications <text:span text:style-name="T3">→</text:span><text:s/>User Interaction <text:span text:style-name="T3">→</text:span><text:s/>App Redirection</text:p>
      <text:p text:style-name="P5"><text:span text:style-name="T1">12. Conclusion</text:span></text:p>
      <text:p text:style-name="P3">FastMatch is a complete real-time social communication platform built to modern industry standards.<text:line-break/><text:line-break/>The platform combines:<text:line-break/>• Secure real-time communication<text:line-break/>• Intelligent matchmaking<text:line-break/>• HD video calling<text:line-break/>• Cross-platform compatibility<text:line-break/>• User safety systems<text:line-break/><text:line-break/>Its scalable architecture and modern technology stack make it suitable for supporting high user activity while maintaining performance, security, and reliabi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6</meta:generator>
    <dc:description>generated by python-docx</dc:description>
    <meta:initial-creator>python-docx</meta:initial-creator>
  </office:meta>
</office:document-meta>
</file>